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ernwaarden:</text:p>
      <text:p text:style-name="Standard"/>
      <text:p text:style-name="Standard">Deskundigheid:</text:p>
      <text:p text:style-name="Standard">zowel op bouwkundig als esthetisch vlak, gezamenlijke kennis en ervaring, we worden vooral ook gevraagd omdat we een ontwerp tot de realisatie kwaliteit aan het ontwerpproces toevoegen. (wellicht daarmee ook Bekwaamheid of Meesterschap)</text:p>
      <text:p text:style-name="Standard"/>
      <text:p text:style-name="Standard">Traditioneel en vernieuwend:</text:p>
      <text:p text:style-name="Standard">belangrijke en bewezen waarden uit ons oeuvre worden voortduren gewogen en opnieuw ingezet hierbij worden ook de grenzen onderzocht en nieuwe materialen/keuzen gewogen die een voorzichtig uitdijen van ons idioom tot gevolg hebben.</text:p>
      <text:p text:style-name="Standard"/>
      <text:p text:style-name="Standard">Ambacht;</text:p>
      <text:p text:style-name="Standard">Combinatie van creativiteit en (technische)deskundigheid</text:p>
      <text:p text:style-name="Standard">Het maken van een ontwerp, een ruimtelijke beleving van licht en schaduw van materieel en van plekken en doorzichten. Met aandacht voor alle sociale, technische en culturele aspecten en contexten rond het ontwerp.</text:p>
      <text:p text:style-name="Standard"/>
      <text:p text:style-name="Standard">Integraliteit:</text:p>
      <text:p text:style-name="Standard">Aandacht voor de gelijktijdigheid en samenhang van creatieve, technische en procesmatige aspecten van het ontwerp.</text:p>
      <text:p text:style-name="Standard">Dit met doel een prettige samenwerking (intern en extern) voor een soepel en efficiënt ontwerp en bouwpro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Keijsers</meta:initial-creator>
    <meta:creation-date>2021-04-15T13:19:30.21</meta:creation-date>
    <dc:date>2021-04-15T13:22:17.85</dc:date>
    <dc:creator>Peter Keijsers</dc:creator>
    <meta:editing-duration>PT2M47S</meta:editing-duration>
    <meta:editing-cycles>2</meta:editing-cycles>
    <meta:generator>OpenOffice/4.1.7$Win32 OpenOffice.org_project/417m1$Build-9800</meta:generator>
    <meta:document-statistic meta:table-count="0" meta:image-count="0" meta:object-count="0" meta:page-count="1" meta:paragraph-count="11" meta:word-count="143" meta:character-count="1034"/>
  </office:meta>
</office:document-meta>
</file>