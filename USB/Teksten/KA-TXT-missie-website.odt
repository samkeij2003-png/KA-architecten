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 svg:font-family="'Arial Nov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font-name="Arial1"/>
    </style:style>
    <style:style style:name="P2" style:family="paragraph" style:parent-style-name="Footer">
      <style:text-properties fo:color="#808080" style:font-name="Arial Nova" fo:font-size="9pt" style:font-size-asian="9pt" style:font-size-complex="9pt"/>
    </style:style>
    <style:style style:name="P3" style:family="paragraph" style:parent-style-name="Standard">
      <style:text-properties fo:color="#808080" style:font-name="Arial Nova"/>
    </style:style>
    <style:style style:name="P4" style:family="paragraph" style:parent-style-name="Standard">
      <style:text-properties fo:color="#808080" style:font-name="Arial Nova" fo:font-size="11pt" style:font-size-asian="11pt" style:font-size-complex="11pt"/>
    </style:style>
    <style:style style:name="P5" style:family="paragraph" style:parent-style-name="Standard">
      <style:text-properties fo:color="#808080" style:font-name="Arial Nova" fo:font-size="11pt" fo:background-color="transparent" style:font-size-asian="11pt" style:font-size-complex="11pt"/>
    </style:style>
    <style:style style:name="P6" style:family="paragraph" style:parent-style-name="Standard">
      <style:text-properties fo:color="#808080" style:font-name="Arial Nov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color="#808080" style:font-name="Arial Nova" fo:font-size="11pt" style:font-size-asian="11pt" style:font-size-complex="11pt"/>
    </style:style>
    <style:style style:name="T1" style:family="text">
      <style:text-properties style:font-name="Arial Nov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
      <text:p text:style-name="P4">KA.architecten een jong bureau met 30 jaar ervaring. </text:p>
      <text:p text:style-name="P4"/>
      <text:p text:style-name="P4">Onze missie is een zoektocht hoe architectuur kan verbinden. Ontwerpen gaan een dialoog aan met de omgeving, worden ingebed in een historische, culturele, maatschappelijke en stedenbouwkundige context. Door deze aandacht voelen de ontwerpen vanzelfsprekend en vertrouwd en daarmee passend op de plek.</text:p>
      <text:p text:style-name="P4"/>
      <text:p text:style-name="P4">Architectuur is het ambacht van het scheppen van ruimte. Zorgvuldig ontworpen details en eerlijke materialen dragen bij aan een duurzaam ontwerp. Kennis van het bouwen, het maken, 3D ontwerpen en samenwerken dragen bij aan een soepel proces.</text:p>
      <text:p text:style-name="P4"/>
      <text:p text:style-name="P5">Bewust en toekomstgericht ontwerpen betekent aandacht voor duurzame materialen en beperken van de energievraag. Optimale isolatie, natuurlijke ventilatie en slimme installaties beperken de energievraag en vergroten het wooncomfort.</text:p>
      <text:p text:style-name="P5"/>
      <text:p text:style-name="P4">De architectuur van KA.architecten is gelaagd, kent meerdere betekenissen, zijn igetogen en hebben een eigen identiteit.</text:p>
      <text:p text:style-name="P4"/>
      <text:p text:style-name="P4">kent vele lagen. De ontwerpen zijn te lezen als sculpturen met een eigen en herkenbare identiteit. Het beleven en ontdekken is daarbij een belangrijk thema. De route naar en <text:s/>door</text:p>
      <text:p text:style-name="P4"/>
      <text:p text:style-name="P4">De ontwerpen worden ervaren als een reeks van plekken. Poorten nodigen uit en verbinden. Wanden en vloeren begrenzen en begeleiden routes en ruimten. Binnenruimten worden vanzelfsprekend met buiten verbonden. De architectuur is uitnodigend en biedt geborgenheid een plek om tot rust te komen.</text:p>
      <text:p text:style-name="P6"/>
      <text:p text:style-name="P6">Ka. staat voor ziel of levenskracht. Architectuur met lading en betekenis, architectuur met <text:s/>een ziel.</text:p>
      <text:p text:style-name="P4"/>
      <text:p text:style-name="P4"><text:s text:c="2"/></text:p>
      <text:p text:style-name="P4"/>
      <text:p text:style-name="P4"/>
      <text:p text:style-name="P4"><text:s/>Peter Keijsers <text:s text:c="2"/>. <text:s text:c="2"/>KA.architect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 svg:font-family="'Arial Nov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1"/>
    </style:style>
    <style:style style:name="MP2" style:family="paragraph" style:parent-style-name="Footer">
      <style:text-properties fo:color="#808080" style:font-name="Arial Nova" fo:font-size="9pt" style:font-size-asian="9pt" style:font-size-complex="9pt"/>
    </style:style>
    <style:style style:name="MT1" style:family="text">
      <style:text-properties style:font-name="Arial Nova"/>
    </style:style>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A.architecten <text:s text:c="3"/></text:span>______________________________________________________</text:p>
      </style:header>
      <style:footer>
        <text:p text:style-name="MP2">KA.architecten <text:s text:c="3"/>. <text:s text:c="4"/>Ankeveenstraat <text:s/>44 <text:s/>5036CB <text:s/>Tilburg <text:s text:c="4"/>. <text:s text:c="4"/>06. 21231821 <text:s text:c="3"/>. <text:s text:c="4"/>p.keijsers@ka-architecten.nl</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KA.brief</dc:title>
    <meta:creation-date>2020-04-07T20:03:03.03</meta:creation-date>
    <meta:editing-cycles>5</meta:editing-cycles>
    <meta:editing-duration>PT1H35M31S</meta:editing-duration>
    <meta:initial-creator>Peter Keijsers</meta:initial-creator>
    <dc:date>2026-05-08T16:12:48.61</dc:date>
    <dc:creator>Peter Keijsers</dc:creator>
    <meta:document-statistic meta:table-count="0" meta:image-count="0" meta:object-count="0" meta:page-count="1" meta:paragraph-count="12" meta:word-count="236" meta:character-count="1748"/>
    <meta:template xlink:type="simple" xlink:actuate="onRequest" xlink:title="KA.brief" xlink:href="file:///C:/Users/pkeij/AppData/Roaming/OpenOffice/4/user/template/KA.brief.ott" meta:date="2020-04-07T20:03:02.14"/>
  </office:meta>
</office:document-meta>
</file>