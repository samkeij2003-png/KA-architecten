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MT" svg:font-family="ArialMT" style:font-family-generic="swiss"/>
    <style:font-face style:name="Lucida Sans1" svg:font-family="'Lucida Sans'"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ef" style:font-family-generic="swiss" style:font-pitch="variable"/>
    <style:font-face style:name="Arial Nova1" svg:font-family="'Arial Nova'" style:font-family-generic="swiss" style:font-pitch="variable"/>
    <style:font-face style:name="Arial Nova" svg:font-family="'Arial Nova'" style:font-adornments="Ve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808080" style:font-name="Arial1"/>
    </style:style>
    <style:style style:name="P2" style:family="paragraph" style:parent-style-name="Footer">
      <style:text-properties fo:color="#808080" style:font-name="Arial1" fo:font-size="9pt" style:font-size-asian="9pt" style:font-size-complex="9pt"/>
    </style:style>
    <style:style style:name="P3" style:family="paragraph" style:parent-style-name="Standard">
      <style:text-properties fo:color="#333333" style:font-name="Arial" fo:font-size="11pt" fo:language="nl" fo:country="NL" style:font-size-asian="11pt" style:font-size-complex="11pt"/>
    </style:style>
    <style:style style:name="P4" style:family="paragraph" style:parent-style-name="Standard">
      <style:text-properties fo:font-size="11pt" style:font-size-asian="11pt" style:font-size-complex="11pt"/>
    </style:style>
    <style:style style:name="P5" style:family="paragraph" style:parent-style-name="Heading_20_1">
      <style:text-properties fo:font-size="11pt" style:font-size-asian="11pt" style:font-size-complex="11pt"/>
    </style:style>
    <style:style style:name="P6" style:family="paragraph" style:parent-style-name="Heading_20_1">
      <style:text-properties fo:font-size="11pt" fo:language="nl" fo:country="NL" style:font-size-asian="11pt" style:font-size-complex="11pt"/>
    </style:style>
    <style:style style:name="T1" style:family="text">
      <style:text-properties style:font-name="Arial Nova1"/>
    </style:style>
    <style:style style:name="T2" style:family="text">
      <style:text-properties fo:language="nl" fo:country="N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oelichting ontwerpfasen. </text:h>
      <text:h text:style-name="P5" text:outline-level="1">Intake.</text:h>
      <text:p text:style-name="P4">Kennismaking, bepreken woonwensen en toelichting ontwerp- en bouwproces..</text:p>
      <text:h text:style-name="P5" text:outline-level="1">Voorlopig Ontwerp.</text:h>
      <text:p text:style-name="P4">Tijdens het voorlopig ontwerp wordt op basis van de mogelijkheden van de locatie, regelgeving, bestemmingsplan en woonwensen een ontwerp gemaakt en in overleg wordt bijgesteld. Het voorlopig ontwerp word gepresenteerd in een A3 boekwerk met plattegronden, gevels en impressies.</text:p>
      <text:h text:style-name="P5" text:outline-level="1">Definitief Ontwerp.</text:h>
      <text:p text:style-name="P4">In deze fase worden ook de adviseurs bij het project betrokken. Naast het ruimtelijk ontwerp worden in deze fase ook ontwerpkeuzes zoals bouwmaterialen, bouwsysteem, en duurzame installaties gemaakt. <text:s/>In deze fase wordt meestal <text:s/>advies gevraagd bij de welstand. En wordt door separate kostendeskundige een indicatie van de bouwkosten gemaakt. </text:p>
      <text:h text:style-name="P5" text:outline-level="1">Technische specificatie / Bouwvoorbereiding.</text:h>
      <text:p text:style-name="P4">In deze fase worden de adviezen van adviseurs in ontwerp verwerkt. Toetsing bouwbesluit, benodigde details en lijst met afwerkingen worden gemaakt. Tekenwerk wordt specifieker en zorgvuldig gemaatvoerd. De separate adviseur bestekken maakt bestek waarin wijze van uitvoering, materiaalkwaliteiten, voorwaarden en garanties worden vastgelegd. En de vergunning wordt ingediend. De meeste vergunningen worden binnen 8 weken door de gemeente afgegeven.</text:p>
      <text:h text:style-name="P5" text:outline-level="1"><text:span text:style-name="T2">Prijs en contractvorming</text:span>.</text:h>
      <text:p text:style-name="P4">De aanbesteding wordt uitgeschreven aan een aantal geschikte aannemers. De aannemer met de laagste inschrijving krijgt meestal de opdracht. In overleg wordt het contract op met de aannemer opgesteld.</text:p>
      <text:h text:style-name="P6" text:outline-level="1">Uitvoeringstekeningen.</text:h>
      <text:p text:style-name="P4">De aannemer start de werkvoorbereiding en uitvoering op basis van aangeleverde matenplannen <text:s/>Aanleveren tekenwerk (matenplannen, gevels, doorsneden, kozijntekeningen en eventueel tekeningen adviseurs) vindt gefaseerd plaats in overleg met de aannemer.</text:p>
      <text:p text:style-name="P4">De aannemer maakt productietekening die hij voorlegt ter goedkeuring.</text:p>
      <text:h text:style-name="P5" text:outline-level="1">Esthetische begeleiding.</text:h>
      <text:p text:style-name="P4">Op aangegeven aantal momenten wordt bouwplaats bezocht om de esthetische kwaliteit te bewaken en bemonstering te beoordelen. Hierbij vindt afstemmen en terugkoppeling met directievoerder en opdrachtgever plaats. En de productietekeningen van de aannemer worden gecontroleerd. </text:p>
      <text:h text:style-name="P5" text:outline-level="1">Directievoering en toezicht.</text:h>
      <text:p text:style-name="P3">Een directievoerder kan door opdrachtgever separaat worden gecontracteerd. De directievoerder kan de belangen van opdrachtgever vertegenwoordigen richting de aannemer. Hij adviseert <text:s/>over de planning, kwaliteit van het werk, over meer- en minderwerk en de uitvoeringswijze van het contract. Hij organiseert de bouwvergaderingen. In een proces verbaal van oplevering worden de restpunten en afspraken voor de afhandeling van de aannemingsovereenkomst vastgeleg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MT" svg:font-family="ArialMT" style:font-family-generic="swiss"/>
    <style:font-face style:name="Lucida Sans1" svg:font-family="'Lucida Sans'"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ef" style:font-family-generic="swiss" style:font-pitch="variable"/>
    <style:font-face style:name="Arial Nova1" svg:font-family="'Arial Nova'" style:font-family-generic="swiss" style:font-pitch="variable"/>
    <style:font-face style:name="Arial Nova" svg:font-family="'Arial Nova'" style:font-adornments="Ve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Arial Nova" fo:font-size="14pt" fo:font-weight="bold" style:font-name-asian="SimSun" style:font-size-asian="24pt" style:font-weight-asian="bold" style:font-name-complex="Lucida Sans" style:font-size-complex="24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Arial1"/>
    </style:style>
    <style:style style:name="MP2" style:family="paragraph" style:parent-style-name="Footer">
      <style:text-properties fo:color="#808080" style:font-name="Arial1" fo:font-size="9pt" style:font-size-asian="9pt" style:font-size-complex="9pt"/>
    </style:style>
    <style:style style:name="MT1" style:family="text">
      <style:text-properties style:font-name="Arial Nova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KA-architecten <text:s text:c="3"/>__________________________________________________________</text:p>
      </style:header>
      <style:footer>
        <text:p text:style-name="MP2"><text:s/><text:span text:style-name="MT1">KA.architecten <text:s text:c="5"/>. <text:s text:c="6"/>Ankeveenstraat <text:s/>44 <text:s/>5036CB <text:s/>Tilburg <text:s text:c="5"/>. <text:s text:c="6"/>06. 21231821 <text:s text:c="5"/>. <text:s text:c="6"/>p.keijsers@ka-architecten.nl</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creation-date>2020-03-30T18:37:47.46</meta:creation-date>
    <meta:editing-cycles>21</meta:editing-cycles>
    <meta:editing-duration>PT9H59M18S</meta:editing-duration>
    <dc:title>KA.brief.sjabloon</dc:title>
    <meta:initial-creator>Peter Keijsers</meta:initial-creator>
    <dc:date>2026-05-08T15:52:55.22</dc:date>
    <dc:creator>Peter Keijsers</dc:creator>
    <meta:printed-by>Peter  Keijsers</meta:printed-by>
    <meta:print-date>2020-07-10T12:49:30.47</meta:print-date>
    <meta:document-statistic meta:table-count="0" meta:image-count="0" meta:object-count="0" meta:page-count="1" meta:paragraph-count="20" meta:word-count="351" meta:character-count="2818"/>
    <meta:template xlink:type="simple" xlink:actuate="onRequest" xlink:title="KA.brief.sjabloon" xlink:href="file:///C:/Users/pkeij/AppData/Roaming/OpenOffice/4/user/template/KA.brief.sjabloon.ott" meta:date="2020-03-30T18:37:47.21"/>
  </office:meta>
</office:document-meta>
</file>