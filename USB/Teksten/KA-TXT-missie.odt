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ef" style:font-family-generic="swiss" style:font-pitch="variable"/>
    <style:font-face style:name="Arial Nova" svg:font-family="'Arial Nov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color="#808080" style:font-name="Arial1"/>
    </style:style>
    <style:style style:name="P2" style:family="paragraph" style:parent-style-name="Footer">
      <style:text-properties fo:color="#808080" style:font-name="Arial Nova" fo:font-size="9pt" style:font-size-asian="9pt" style:font-size-complex="9pt"/>
    </style:style>
    <style:style style:name="P3" style:family="paragraph" style:parent-style-name="Standard">
      <style:text-properties fo:color="#808080" style:font-name="Arial Nova"/>
    </style:style>
    <style:style style:name="P4" style:family="paragraph" style:parent-style-name="Standard">
      <style:text-properties fo:color="#808080" style:font-name="Arial Nova" fo:font-size="11pt" style:font-size-asian="11pt" style:font-size-complex="11pt"/>
    </style:style>
    <style:style style:name="P5" style:family="paragraph" style:parent-style-name="Standard">
      <style:text-properties fo:color="#808080" style:font-name="Arial Nova" fo:font-size="11pt" fo:background-color="transparent" style:font-size-asian="11pt" style:font-size-complex="11pt"/>
    </style:style>
    <style:style style:name="P6" style:family="paragraph" style:parent-style-name="Standard">
      <style:text-properties fo:color="#808080" style:font-name="Arial Nova" fo:font-size="11pt" fo:font-style="normal" fo:font-weight="normal" style:font-size-asian="11pt" style:font-style-asian="normal" style:font-weight-asian="normal" style:font-size-complex="11pt" style:font-style-complex="normal" style:font-weight-complex="normal"/>
    </style:style>
    <style:style style:name="P7" style:family="paragraph" style:parent-style-name="Standard">
      <style:text-properties fo:color="#808080" style:font-name="Arial Nova" fo:font-size="11pt" style:font-size-asian="11pt" style:font-size-complex="11pt"/>
    </style:style>
    <style:style style:name="T1" style:family="text">
      <style:text-properties style:font-name="Arial Nov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Geachte lezer.</text:p>
      <text:p text:style-name="P4"/>
      <text:p text:style-name="P4">Op 1 maart heb ik een nieuw architectenbureau opgericht: KA.architecten. </text:p>
      <text:p text:style-name="P4">KA.architecten is een jong bureau met 30 jaar ervaring. Deze ervaring heb ik opgedaan als senior architect bij Bedaux de Brouwer Architecten in Goirle. Hier ben ik, naast mijn eigen bureau, nog steeds werkzaam als architect <text:s/>in ontwerpteams van grootschalige projecten. Bij Bedaux de Brouwer architecten hou ik mij vooral bezig met grootschalige complexe ontwerpopgaven. Bij KA.architecten hou ik mij bezig met kleinschalige ontwerpopgaven, betrokken en met andere aandacht voor architectuur.</text:p>
      <text:p text:style-name="P4"/>
      <text:p text:style-name="P4">Mijn missie is een zoektocht hoe architectuur kan verbinden door ontwerpen zorgvuldig in te passen in <text:s/>de verschillende contexten. Ontwerpen worden ingebed in een historische, culturele, maatschappelijke en stedenbouwkundige context. Ontwerpen gaan een dialoog aan met de omgeving. Door deze aandacht voelen de ontwerpen vanzelfsprekend en vertrouwd en daarmee passend op de plek.</text:p>
      <text:p text:style-name="P4"/>
      <text:p text:style-name="P4">Architectuur is het ambacht van het scheppen van ruimte. De maakbaarheid is daarbij een belangrijk aspect. Zorgvuldig ontworpen details en eerlijke materialen dragen bij aan een duurzaam ontwerp. <text:s/>Kennis van het bouwen, gevoel voor constructie, 3D ontwerpen en digitaal samenwerken dragen bij aan een soepel proces.</text:p>
      <text:p text:style-name="P4"/>
      <text:p text:style-name="P5">Bewust en toekomstgericht ontwerpen betekent aandacht voor duurzame materialen en beperken van de energievraag. Door zorgvuldige aandacht voor optimale isolatie, natuurlijke ventilatie en slimme installaties dragen nieuwe energieconcepten, naast het beperken van de energievraag en CO2-footprint, bij aan het vergroten van wooncomfort en een prettige werkomgeving. <text:s/></text:p>
      <text:p text:style-name="P5"/>
      <text:p text:style-name="P4">Mijn architectuur kent vele lagen. De ontwerpen zijn te lezen als sculpturen met een eigen en herkenbare identiteit. Het beleven en ontdekken is daarbij een belangrijk thema. De route naar en <text:s/>door de ontwerpen kan worden ervaren als een reeks van geschakelde plekken. Poorten nodigen uit en geven toegang. Wanden en vloeren begrenzen en begeleiden routes en ruimten. Openingen geven zicht op belangrijke objecten in omgeving en verbindt het binnen met buiten en daarmee het ontwerp met zijn plek.</text:p>
      <text:p text:style-name="P4">Mijn architectuur activeert, gaat in dialoog en versterkt daarmee de plek. Mijn architectuur is uitnodigend en biedt een plek om te ontmoeten en geeft door geborgenheid een plek om tot rust te komen.</text:p>
      <text:p text:style-name="P6"/>
      <text:p text:style-name="P6">Diepere betekenis KA.architecten; <text:s/>Ka is Egyptisch voor ziel of levenskracht. Architectuur geeft lading, betekenis en daarmee een ziel aan objecten. Gebouwen en objecten met ziel worden meer gewaardeerd en gekoesterd.</text:p>
      <text:p text:style-name="P4"/>
      <text:p text:style-name="P4"><text:s text:c="2"/></text:p>
      <text:p text:style-name="P4"/>
      <text:p text:style-name="P4"/>
      <text:p text:style-name="P4">Met vriendelijke groet <text:s text:c="2"/>. <text:s text:c="2"/>Peter Keijsers <text:s text:c="2"/>. <text:s text:c="2"/>KA.architecte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ef" style:font-family-generic="swiss" style:font-pitch="variable"/>
    <style:font-face style:name="Arial Nova" svg:font-family="'Arial Nov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color="#808080" style:font-name="Arial1"/>
    </style:style>
    <style:style style:name="MP2" style:family="paragraph" style:parent-style-name="Footer">
      <style:text-properties fo:color="#808080" style:font-name="Arial Nova" fo:font-size="9pt" style:font-size-asian="9pt" style:font-size-complex="9pt"/>
    </style:style>
    <style:style style:name="MT1" style:family="text">
      <style:text-properties style:font-name="Arial Nova"/>
    </style:style>
    <style:page-layout style:name="Mpm1">
      <style:page-layout-properties fo:page-width="21.001cm" fo:page-height="29.7cm" style:num-format="1" style:print-orientation="portrait" fo:margin-top="2cm" fo:margin-bottom="2cm" fo:margin-left="2.499cm" fo:margin-right="2.499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KA.architecten <text:s text:c="3"/></text:span>______________________________________________________</text:p>
      </style:header>
      <style:footer>
        <text:p text:style-name="MP2">KA.architecten <text:s text:c="3"/>. <text:s text:c="4"/>Ankeveenstraat <text:s/>44 <text:s/>5036CB <text:s/>Tilburg <text:s text:c="4"/>. <text:s text:c="4"/>06. 21231821 <text:s text:c="3"/>. <text:s text:c="4"/>p.keijsers@ka-architecten.nl</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KA.brief</dc:title>
    <meta:creation-date>2020-04-07T20:03:03.03</meta:creation-date>
    <meta:editing-cycles>4</meta:editing-cycles>
    <meta:editing-duration>PT59M4S</meta:editing-duration>
    <meta:initial-creator>Peter Keijsers</meta:initial-creator>
    <dc:date>2020-04-09T08:47:10.91</dc:date>
    <dc:creator>Peter Keijsers</dc:creator>
    <meta:document-statistic meta:table-count="0" meta:image-count="0" meta:object-count="0" meta:page-count="1" meta:paragraph-count="13" meta:word-count="391" meta:character-count="2811"/>
    <meta:template xlink:type="simple" xlink:actuate="onRequest" xlink:title="KA.brief" xlink:href="file:///C:/Users/pkeij/AppData/Roaming/OpenOffice/4/user/template/KA.brief.ott" meta:date="2020-04-07T20:03:02.14"/>
  </office:meta>
</office:document-meta>
</file>